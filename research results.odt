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ff3" svg:font-family="ff3"/>
    <style:font-face style:name="ff5" svg:font-family="ff5"/>
  </office:font-face-decls>
  <office:automatic-styles>
    <style:style style:name="P1" style:family="paragraph" style:parent-style-name="Standard">
      <style:text-properties officeooo:rsid="00142c70" officeooo:paragraph-rsid="00142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DATA SCIENCE?</text:p>
      <text:p text:style-name="P1"/>
      <text:p text:style-name="P1"/>
      <text:p text:style-name="P1">Roles related to Data Science:</text:p>
      <text:p text:style-name="P1">● <text:s text:c="2"/>Data architect - A data architect is required to create, deploy, and maintain data for an organization. <text:s/></text:p>
      <text:p text:style-name="P1">● <text:s text:c="2"/>Data engineer- These are people who design software and programs to manage big data, collect and store them in required formats. </text:p>
      <text:p text:style-name="P1">● <text:s text:c="2"/>Data administrator - He/ she manages the stored data ready to be used for analysis and keeps a check on the flow of data.</text:p>
      <text:p text:style-name="P1"/>
      <text:p text:style-name="P1">1. Data Analyst</text:p>
      <text:p text:style-name="P1"/>
      <text:p text:style-name="P1">What is the difference between Data Analysis and Data Analytics?</text:p>
      <text:p text:style-name="P1"/>
      <text:p text:style-name="P1">An analysis is when we use <text:s/>inferential statistics <text:s/>to find answers <text:s/>to questions <text:s/>of the past, <text:s/>whereas analytics <text:s/>is when we <text:s/>use the <text:s/>data collected and the techniques are known to predict future outcomes.</text:p>
      <text:p text:style-name="P1"/>
      <text:p text:style-name="P1">2. Business Analyst</text:p>
      <text:p text:style-name="P1"/>
      <text:p text:style-name="P1">Use various statistical techniques to form relations between various variables and analyze the trends in business activities and ultimately find solutions to the ongoing problems</text:p>
      <text:p text:style-name="P1"/>
      <text:p text:style-name="P1">Tools:</text:p>
      <text:p text:style-name="P1">- SAP Business Intelligence</text:p>
      <text:p text:style-name="P1">- Microstrategy</text:p>
      <text:p text:style-name="P1">- Datapine</text:p>
      <text:p text:style-name="P1">- Yellowfin BI</text:p>
      <text:p text:style-name="P1">- QlikeSense</text:p>
      <text:p text:style-name="P1">- Microsoft Power BI</text:p>
      <text:p text:style-name="P1"/>
      <text:p text:style-name="P1">3. Machine Learning</text:p>
      <text:p text:style-name="P1">a part of data science that deals with artificial intelligence. It in a way helps to make the computers learn from <text:s/>the data.</text:p>
      <text:p text:style-name="P1"/>
      <text:p text:style-name="P1">- Supervised Learning</text:p>
      <text:p text:style-name="P1">- Unsupervised Learning</text:p>
      <text:p text:style-name="P1">- Reinforcement Learning</text:p>
      <text:p text:style-name="P1"/>
      <text:p text:style-name="P1"/>
      <text:p text:style-name="P1">Domain Specific</text:p>
      <text:p text:style-name="P1">1. Finance and Banking Analytics</text:p>
      <text:p text:style-name="P1">2. Healthcare and Medical Analytics</text:p>
      <text:p text:style-name="P1">3. Marketing and Consumer Behavior Analytics</text:p>
      <text:p text:style-name="P1">4. E-Commerce and Retail Analytics</text:p>
      <text:p text:style-name="P1">5. Sports and Performance Analytics</text:p>
      <text:p text:style-name="P1"/>
      <text:p text:style-name="P1">4. Data Engineer</text:p>
      <text:p text:style-name="P1">5. Data Architect</text:p>
      <text:p text:style-name="P1">6. Data Scientist</text:p>
      <text:p text:style-name="P1">7. AI Engineer</text:p>
      <text:p text:style-name="P1"><text:soft-page-break/>8. Automation Engine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ff3" svg:font-family="ff3"/>
    <style:font-face style:name="ff5" svg:font-family="ff5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16:11:27.865364819</meta:creation-date>
    <dc:date>2026-07-16T19:43:15.961364127</dc:date>
    <meta:editing-duration>PT1M28S</meta:editing-duration>
    <meta:editing-cycles>1</meta:editing-cycles>
    <meta:document-statistic meta:table-count="0" meta:image-count="0" meta:object-count="0" meta:page-count="2" meta:paragraph-count="33" meta:word-count="245" meta:character-count="1499" meta:non-whitespace-character-count="1269"/>
    <meta:generator>LibreOffice/24.2.7.2$Linux_X86_64 LibreOffice_project/420$Build-2</meta:generator>
  </office:meta>
</office:document-meta>
</file>